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rital_status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monthly_income</text:p>
          </table:table-cell>
          <table:table-cell office:value-type="string" calcext:value-type="string">
            <text:p>educational_qualifications</text:p>
          </table:table-cell>
          <table:table-cell office:value-type="string" calcext:value-type="string">
            <text:p>family_siz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in_co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nnamed:_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51" calcext:value-type="float">
            <text:p>12.9551</text:p>
          </table:table-cell>
          <table:table-cell office:value-type="float" office:value="77.6593" calcext:value-type="float">
            <text:p>77.6593</text:p>
          </table:table-cell>
          <table:table-cell office:value-type="float" office:value="560017" calcext:value-type="float">
            <text:p>5600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473" calcext:value-type="float">
            <text:p>12.9473</text:p>
          </table:table-cell>
          <table:table-cell office:value-type="float" office:value="77.5616" calcext:value-type="float">
            <text:p>77.5616</text:p>
          </table:table-cell>
          <table:table-cell office:value-type="float" office:value="560019" calcext:value-type="float">
            <text:p>560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99" calcext:value-type="float">
            <text:p>12.9299</text:p>
          </table:table-cell>
          <table:table-cell office:value-type="float" office:value="77.6848" calcext:value-type="float">
            <text:p>77.6848</text:p>
          </table:table-cell>
          <table:table-cell office:value-type="float" office:value="560103" calcext:value-type="float">
            <text:p>560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28" calcext:value-type="float">
            <text:p>12.9828</text:p>
          </table:table-cell>
          <table:table-cell office:value-type="float" office:value="77.6131" calcext:value-type="float">
            <text:p>77.6131</text:p>
          </table:table-cell>
          <table:table-cell office:value-type="float" office:value="560042" calcext:value-type="float">
            <text:p>5600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54" calcext:value-type="float">
            <text:p>12.9854</text:p>
          </table:table-cell>
          <table:table-cell office:value-type="float" office:value="77.7081" calcext:value-type="float">
            <text:p>77.7081</text:p>
          </table:table-cell>
          <table:table-cell office:value-type="float" office:value="560048" calcext:value-type="float">
            <text:p>560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8988" calcext:value-type="float">
            <text:p>12.8988</text:p>
          </table:table-cell>
          <table:table-cell office:value-type="float" office:value="77.5764" calcext:value-type="float">
            <text:p>77.5764</text:p>
          </table:table-cell>
          <table:table-cell office:value-type="float" office:value="560078" calcext:value-type="float">
            <text:p>5600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438" calcext:value-type="float">
            <text:p>12.9438</text:p>
          </table:table-cell>
          <table:table-cell office:value-type="float" office:value="77.5738" calcext:value-type="float">
            <text:p>77.5738</text:p>
          </table:table-cell>
          <table:table-cell office:value-type="float" office:value="560004" calcext:value-type="float">
            <text:p>560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77.6399" calcext:value-type="float">
            <text:p>77.6399</text:p>
          </table:table-cell>
          <table:table-cell office:value-type="float" office:value="560068" calcext:value-type="float">
            <text:p>5600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2" calcext:value-type="float">
            <text:p>12.982</text:p>
          </table:table-cell>
          <table:table-cell office:value-type="float" office:value="77.6256" calcext:value-type="float">
            <text:p>77.6256</text:p>
          </table:table-cell>
          <table:table-cell office:value-type="float" office:value="560008" calcext:value-type="float">
            <text:p>560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8988" calcext:value-type="float">
            <text:p>12.8988</text:p>
          </table:table-cell>
          <table:table-cell office:value-type="float" office:value="77.5764" calcext:value-type="float">
            <text:p>77.5764</text:p>
          </table:table-cell>
          <table:table-cell office:value-type="float" office:value="560078" calcext:value-type="float">
            <text:p>5600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298" calcext:value-type="float">
            <text:p>13.0298</text:p>
          </table:table-cell>
          <table:table-cell office:value-type="float" office:value="77.6047" calcext:value-type="float">
            <text:p>77.6047</text:p>
          </table:table-cell>
          <table:table-cell office:value-type="float" office:value="560032" calcext:value-type="float">
            <text:p>5600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983" calcext:value-type="float">
            <text:p>12.9983</text:p>
          </table:table-cell>
          <table:table-cell office:value-type="float" office:value="77.6409" calcext:value-type="float">
            <text:p>77.6409</text:p>
          </table:table-cell>
          <table:table-cell office:value-type="float" office:value="560033" calcext:value-type="float">
            <text:p>560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925" calcext:value-type="float">
            <text:p>12.9925</text:p>
          </table:table-cell>
          <table:table-cell office:value-type="float" office:value="77.5633" calcext:value-type="float">
            <text:p>77.5633</text:p>
          </table:table-cell>
          <table:table-cell office:value-type="float" office:value="560021" calcext:value-type="float">
            <text:p>56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06" calcext:value-type="float">
            <text:p>12.9306</text:p>
          </table:table-cell>
          <table:table-cell office:value-type="float" office:value="77.5434" calcext:value-type="float">
            <text:p>77.5434</text:p>
          </table:table-cell>
          <table:table-cell office:value-type="float" office:value="560085" calcext:value-type="float">
            <text:p>5600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2" calcext:value-type="float">
            <text:p>12.982</text:p>
          </table:table-cell>
          <table:table-cell office:value-type="float" office:value="77.6256" calcext:value-type="float">
            <text:p>77.6256</text:p>
          </table:table-cell>
          <table:table-cell office:value-type="float" office:value="560008" calcext:value-type="float">
            <text:p>560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353" calcext:value-type="float">
            <text:p>12.9353</text:p>
          </table:table-cell>
          <table:table-cell office:value-type="float" office:value="77.5585" calcext:value-type="float">
            <text:p>77.5585</text:p>
          </table:table-cell>
          <table:table-cell office:value-type="float" office:value="560050" calcext:value-type="float">
            <text:p>5600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77.5135" calcext:value-type="float">
            <text:p>77.5135</text:p>
          </table:table-cell>
          <table:table-cell office:value-type="float" office:value="560098" calcext:value-type="float">
            <text:p>5600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54" calcext:value-type="float">
            <text:p>12.9854</text:p>
          </table:table-cell>
          <table:table-cell office:value-type="float" office:value="77.7081" calcext:value-type="float">
            <text:p>77.7081</text:p>
          </table:table-cell>
          <table:table-cell office:value-type="float" office:value="560048" calcext:value-type="float">
            <text:p>560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4" calcext:value-type="float">
            <text:p>4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119" calcext:value-type="float">
            <text:p>12.9119</text:p>
          </table:table-cell>
          <table:table-cell office:value-type="float" office:value="77.6446" calcext:value-type="float">
            <text:p>77.6446</text:p>
          </table:table-cell>
          <table:table-cell office:value-type="float" office:value="560102" calcext:value-type="float">
            <text:p>56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06" calcext:value-type="float">
            <text:p>12.9306</text:p>
          </table:table-cell>
          <table:table-cell office:value-type="float" office:value="77.5434" calcext:value-type="float">
            <text:p>77.5434</text:p>
          </table:table-cell>
          <table:table-cell office:value-type="float" office:value="560085" calcext:value-type="float">
            <text:p>5600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2" calcext:value-type="float">
            <text:p>12.982</text:p>
          </table:table-cell>
          <table:table-cell office:value-type="float" office:value="77.6256" calcext:value-type="float">
            <text:p>77.6256</text:p>
          </table:table-cell>
          <table:table-cell office:value-type="float" office:value="560008" calcext:value-type="float">
            <text:p>560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438" calcext:value-type="float">
            <text:p>12.9438</text:p>
          </table:table-cell>
          <table:table-cell office:value-type="float" office:value="77.5738" calcext:value-type="float">
            <text:p>77.5738</text:p>
          </table:table-cell>
          <table:table-cell office:value-type="float" office:value="560004" calcext:value-type="float">
            <text:p>560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8988" calcext:value-type="float">
            <text:p>12.8988</text:p>
          </table:table-cell>
          <table:table-cell office:value-type="float" office:value="77.5764" calcext:value-type="float">
            <text:p>77.5764</text:p>
          </table:table-cell>
          <table:table-cell office:value-type="float" office:value="560078" calcext:value-type="float">
            <text:p>5600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Uneducated</text:p>
          </table:table-cell>
          <table:table-cell office:value-type="float" office:value="4" calcext:value-type="float">
            <text:p>4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77.6068" calcext:value-type="float">
            <text:p>77.6068</text:p>
          </table:table-cell>
          <table:table-cell office:value-type="float" office:value="560025" calcext:value-type="float">
            <text:p>560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65" calcext:value-type="float">
            <text:p>12.9565</text:p>
          </table:table-cell>
          <table:table-cell office:value-type="float" office:value="77.5484" calcext:value-type="float">
            <text:p>77.5484</text:p>
          </table:table-cell>
          <table:table-cell office:value-type="float" office:value="560026" calcext:value-type="float">
            <text:p>5600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925" calcext:value-type="float">
            <text:p>12.9925</text:p>
          </table:table-cell>
          <table:table-cell office:value-type="float" office:value="77.5633" calcext:value-type="float">
            <text:p>77.5633</text:p>
          </table:table-cell>
          <table:table-cell office:value-type="float" office:value="560021" calcext:value-type="float">
            <text:p>56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2" calcext:value-type="float">
            <text:p>12.982</text:p>
          </table:table-cell>
          <table:table-cell office:value-type="float" office:value="77.6256" calcext:value-type="float">
            <text:p>77.6256</text:p>
          </table:table-cell>
          <table:table-cell office:value-type="float" office:value="560008" calcext:value-type="float">
            <text:p>560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635" calcext:value-type="float">
            <text:p>12.9635</text:p>
          </table:table-cell>
          <table:table-cell office:value-type="float" office:value="77.5821" calcext:value-type="float">
            <text:p>77.5821</text:p>
          </table:table-cell>
          <table:table-cell office:value-type="float" office:value="560002" calcext:value-type="float">
            <text:p>560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06" calcext:value-type="float">
            <text:p>12.9306</text:p>
          </table:table-cell>
          <table:table-cell office:value-type="float" office:value="77.5434" calcext:value-type="float">
            <text:p>77.5434</text:p>
          </table:table-cell>
          <table:table-cell office:value-type="float" office:value="560085" calcext:value-type="float">
            <text:p>5600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67" calcext:value-type="float">
            <text:p>13.0067</text:p>
          </table:table-cell>
          <table:table-cell office:value-type="float" office:value="77.545" calcext:value-type="float">
            <text:p>77.545</text:p>
          </table:table-cell>
          <table:table-cell office:value-type="float" office:value="560086" calcext:value-type="float">
            <text:p>5600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2.9119" calcext:value-type="float">
            <text:p>12.9119</text:p>
          </table:table-cell>
          <table:table-cell office:value-type="float" office:value="77.6446" calcext:value-type="float">
            <text:p>77.6446</text:p>
          </table:table-cell>
          <table:table-cell office:value-type="float" office:value="560102" calcext:value-type="float">
            <text:p>56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067" calcext:value-type="float">
            <text:p>13.0067</text:p>
          </table:table-cell>
          <table:table-cell office:value-type="float" office:value="77.545" calcext:value-type="float">
            <text:p>77.545</text:p>
          </table:table-cell>
          <table:table-cell office:value-type="float" office:value="560086" calcext:value-type="float">
            <text:p>5600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8988" calcext:value-type="float">
            <text:p>12.8988</text:p>
          </table:table-cell>
          <table:table-cell office:value-type="float" office:value="77.5764" calcext:value-type="float">
            <text:p>77.5764</text:p>
          </table:table-cell>
          <table:table-cell office:value-type="float" office:value="560078" calcext:value-type="float">
            <text:p>5600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3.0012" calcext:value-type="float">
            <text:p>13.0012</text:p>
          </table:table-cell>
          <table:table-cell office:value-type="float" office:value="77.5995" calcext:value-type="float">
            <text:p>77.5995</text:p>
          </table:table-cell>
          <table:table-cell office:value-type="float" office:value="560046" calcext:value-type="float">
            <text:p>560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77.6076" calcext:value-type="float">
            <text:p>77.6076</text:p>
          </table:table-cell>
          <table:table-cell office:value-type="float" office:value="560030" calcext:value-type="float">
            <text:p>560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4" calcext:value-type="float">
            <text:p>4</text:p>
          </table:table-cell>
          <table:table-cell office:value-type="float" office:value="12.9438" calcext:value-type="float">
            <text:p>12.9438</text:p>
          </table:table-cell>
          <table:table-cell office:value-type="float" office:value="77.5738" calcext:value-type="float">
            <text:p>77.5738</text:p>
          </table:table-cell>
          <table:table-cell office:value-type="float" office:value="560004" calcext:value-type="float">
            <text:p>560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89" calcext:value-type="float">
            <text:p>12.9889</text:p>
          </table:table-cell>
          <table:table-cell office:value-type="float" office:value="77.5741" calcext:value-type="float">
            <text:p>77.5741</text:p>
          </table:table-cell>
          <table:table-cell office:value-type="float" office:value="560020" calcext:value-type="float">
            <text:p>560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35" calcext:value-type="float">
            <text:p>12.9335</text:p>
          </table:table-cell>
          <table:table-cell office:value-type="float" office:value="77.5691" calcext:value-type="float">
            <text:p>77.5691</text:p>
          </table:table-cell>
          <table:table-cell office:value-type="float" office:value="560028" calcext:value-type="float">
            <text:p>5600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102" calcext:value-type="float">
            <text:p>13.102</text:p>
          </table:table-cell>
          <table:table-cell office:value-type="float" office:value="77.5864" calcext:value-type="float">
            <text:p>77.5864</text:p>
          </table:table-cell>
          <table:table-cell office:value-type="float" office:value="560064" calcext:value-type="float">
            <text:p>5600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037" calcext:value-type="float">
            <text:p>12.9037</text:p>
          </table:table-cell>
          <table:table-cell office:value-type="float" office:value="77.5376" calcext:value-type="float">
            <text:p>77.5376</text:p>
          </table:table-cell>
          <table:table-cell office:value-type="float" office:value="560061" calcext:value-type="float">
            <text:p>5600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438" calcext:value-type="float">
            <text:p>12.9438</text:p>
          </table:table-cell>
          <table:table-cell office:value-type="float" office:value="77.5738" calcext:value-type="float">
            <text:p>77.5738</text:p>
          </table:table-cell>
          <table:table-cell office:value-type="float" office:value="560004" calcext:value-type="float">
            <text:p>560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289" calcext:value-type="float">
            <text:p>13.0289</text:p>
          </table:table-cell>
          <table:table-cell office:value-type="float" office:value="77.54" calcext:value-type="float">
            <text:p>77.54</text:p>
          </table:table-cell>
          <table:table-cell office:value-type="float" office:value="560022" calcext:value-type="float">
            <text:p>560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89" calcext:value-type="float">
            <text:p>13.0289</text:p>
          </table:table-cell>
          <table:table-cell office:value-type="float" office:value="77.54" calcext:value-type="float">
            <text:p>77.54</text:p>
          </table:table-cell>
          <table:table-cell office:value-type="float" office:value="560022" calcext:value-type="float">
            <text:p>560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h.D</text:p>
          </table:table-cell>
          <table:table-cell office:value-type="float" office:value="1" calcext:value-type="float">
            <text:p>1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77.5921" calcext:value-type="float">
            <text:p>77.5921</text:p>
          </table:table-cell>
          <table:table-cell office:value-type="float" office:value="560027" calcext:value-type="float">
            <text:p>5600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579" calcext:value-type="float">
            <text:p>12.9579</text:p>
          </table:table-cell>
          <table:table-cell office:value-type="float" office:value="77.6309" calcext:value-type="float">
            <text:p>77.6309</text:p>
          </table:table-cell>
          <table:table-cell office:value-type="float" office:value="560007" calcext:value-type="float">
            <text:p>560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Uneducated</text:p>
          </table:table-cell>
          <table:table-cell office:value-type="float" office:value="3" calcext:value-type="float">
            <text:p>3</text:p>
          </table:table-cell>
          <table:table-cell office:value-type="float" office:value="13.014" calcext:value-type="float">
            <text:p>13.014</text:p>
          </table:table-cell>
          <table:table-cell office:value-type="float" office:value="77.5658" calcext:value-type="float">
            <text:p>77.5658</text:p>
          </table:table-cell>
          <table:table-cell office:value-type="float" office:value="560012" calcext:value-type="float">
            <text:p>560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35" calcext:value-type="float">
            <text:p>12.9335</text:p>
          </table:table-cell>
          <table:table-cell office:value-type="float" office:value="77.5691" calcext:value-type="float">
            <text:p>77.5691</text:p>
          </table:table-cell>
          <table:table-cell office:value-type="float" office:value="560028" calcext:value-type="float">
            <text:p>5600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77.6076" calcext:value-type="float">
            <text:p>77.6076</text:p>
          </table:table-cell>
          <table:table-cell office:value-type="float" office:value="560030" calcext:value-type="float">
            <text:p>560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438" calcext:value-type="float">
            <text:p>12.9438</text:p>
          </table:table-cell>
          <table:table-cell office:value-type="float" office:value="77.5738" calcext:value-type="float">
            <text:p>77.5738</text:p>
          </table:table-cell>
          <table:table-cell office:value-type="float" office:value="560004" calcext:value-type="float">
            <text:p>560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635" calcext:value-type="float">
            <text:p>12.9635</text:p>
          </table:table-cell>
          <table:table-cell office:value-type="float" office:value="77.5821" calcext:value-type="float">
            <text:p>77.5821</text:p>
          </table:table-cell>
          <table:table-cell office:value-type="float" office:value="560002" calcext:value-type="float">
            <text:p>560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925" calcext:value-type="float">
            <text:p>12.9925</text:p>
          </table:table-cell>
          <table:table-cell office:value-type="float" office:value="77.5633" calcext:value-type="float">
            <text:p>77.5633</text:p>
          </table:table-cell>
          <table:table-cell office:value-type="float" office:value="560021" calcext:value-type="float">
            <text:p>56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551" calcext:value-type="float">
            <text:p>12.9551</text:p>
          </table:table-cell>
          <table:table-cell office:value-type="float" office:value="77.6593" calcext:value-type="float">
            <text:p>77.6593</text:p>
          </table:table-cell>
          <table:table-cell office:value-type="float" office:value="560017" calcext:value-type="float">
            <text:p>5600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School</text:p>
          </table:table-cell>
          <table:table-cell office:value-type="float" office:value="5" calcext:value-type="float">
            <text:p>5</text:p>
          </table:table-cell>
          <table:table-cell office:value-type="float" office:value="13.0289" calcext:value-type="float">
            <text:p>13.0289</text:p>
          </table:table-cell>
          <table:table-cell office:value-type="float" office:value="77.54" calcext:value-type="float">
            <text:p>77.54</text:p>
          </table:table-cell>
          <table:table-cell office:value-type="float" office:value="560022" calcext:value-type="float">
            <text:p>560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2" calcext:value-type="float">
            <text:p>2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77.5877" calcext:value-type="float">
            <text:p>77.5877</text:p>
          </table:table-cell>
          <table:table-cell office:value-type="float" office:value="560006" calcext:value-type="float">
            <text:p>560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635" calcext:value-type="float">
            <text:p>12.9635</text:p>
          </table:table-cell>
          <table:table-cell office:value-type="float" office:value="77.5821" calcext:value-type="float">
            <text:p>77.5821</text:p>
          </table:table-cell>
          <table:table-cell office:value-type="float" office:value="560002" calcext:value-type="float">
            <text:p>560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2.9635" calcext:value-type="float">
            <text:p>12.9635</text:p>
          </table:table-cell>
          <table:table-cell office:value-type="float" office:value="77.5821" calcext:value-type="float">
            <text:p>77.5821</text:p>
          </table:table-cell>
          <table:table-cell office:value-type="float" office:value="560002" calcext:value-type="float">
            <text:p>560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6" calcext:value-type="float">
            <text:p>6</text:p>
          </table:table-cell>
          <table:table-cell office:value-type="float" office:value="12.9635" calcext:value-type="float">
            <text:p>12.9635</text:p>
          </table:table-cell>
          <table:table-cell office:value-type="float" office:value="77.5821" calcext:value-type="float">
            <text:p>77.5821</text:p>
          </table:table-cell>
          <table:table-cell office:value-type="float" office:value="560002" calcext:value-type="float">
            <text:p>560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635" calcext:value-type="float">
            <text:p>12.9635</text:p>
          </table:table-cell>
          <table:table-cell office:value-type="float" office:value="77.5821" calcext:value-type="float">
            <text:p>77.5821</text:p>
          </table:table-cell>
          <table:table-cell office:value-type="float" office:value="560002" calcext:value-type="float">
            <text:p>560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19" calcext:value-type="float">
            <text:p>13.0019</text:p>
          </table:table-cell>
          <table:table-cell office:value-type="float" office:value="77.5713" calcext:value-type="float">
            <text:p>77.5713</text:p>
          </table:table-cell>
          <table:table-cell office:value-type="float" office:value="560003" calcext:value-type="float">
            <text:p>560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77.6176" calcext:value-type="float">
            <text:p>77.6176</text:p>
          </table:table-cell>
          <table:table-cell office:value-type="float" office:value="560047" calcext:value-type="float">
            <text:p>5600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98" calcext:value-type="float">
            <text:p>12.998</text:p>
          </table:table-cell>
          <table:table-cell office:value-type="float" office:value="77.6227" calcext:value-type="float">
            <text:p>77.6227</text:p>
          </table:table-cell>
          <table:table-cell office:value-type="float" office:value="560005" calcext:value-type="float">
            <text:p>560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2.998" calcext:value-type="float">
            <text:p>12.998</text:p>
          </table:table-cell>
          <table:table-cell office:value-type="float" office:value="77.6227" calcext:value-type="float">
            <text:p>77.6227</text:p>
          </table:table-cell>
          <table:table-cell office:value-type="float" office:value="560005" calcext:value-type="float">
            <text:p>560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98" calcext:value-type="float">
            <text:p>12.998</text:p>
          </table:table-cell>
          <table:table-cell office:value-type="float" office:value="77.6227" calcext:value-type="float">
            <text:p>77.6227</text:p>
          </table:table-cell>
          <table:table-cell office:value-type="float" office:value="560005" calcext:value-type="float">
            <text:p>560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102" calcext:value-type="float">
            <text:p>13.102</text:p>
          </table:table-cell>
          <table:table-cell office:value-type="float" office:value="77.5864" calcext:value-type="float">
            <text:p>77.5864</text:p>
          </table:table-cell>
          <table:table-cell office:value-type="float" office:value="560064" calcext:value-type="float">
            <text:p>5600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98" calcext:value-type="float">
            <text:p>12.998</text:p>
          </table:table-cell>
          <table:table-cell office:value-type="float" office:value="77.6227" calcext:value-type="float">
            <text:p>77.6227</text:p>
          </table:table-cell>
          <table:table-cell office:value-type="float" office:value="560005" calcext:value-type="float">
            <text:p>560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School</text:p>
          </table:table-cell>
          <table:table-cell office:value-type="float" office:value="5" calcext:value-type="float">
            <text:p>5</text:p>
          </table:table-cell>
          <table:table-cell office:value-type="float" office:value="12.998" calcext:value-type="float">
            <text:p>12.998</text:p>
          </table:table-cell>
          <table:table-cell office:value-type="float" office:value="77.6227" calcext:value-type="float">
            <text:p>77.6227</text:p>
          </table:table-cell>
          <table:table-cell office:value-type="float" office:value="560005" calcext:value-type="float">
            <text:p>560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77.5877" calcext:value-type="float">
            <text:p>77.5877</text:p>
          </table:table-cell>
          <table:table-cell office:value-type="float" office:value="560006" calcext:value-type="float">
            <text:p>560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77.5877" calcext:value-type="float">
            <text:p>77.5877</text:p>
          </table:table-cell>
          <table:table-cell office:value-type="float" office:value="560006" calcext:value-type="float">
            <text:p>5600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96" calcext:value-type="float">
            <text:p>13.0496</text:p>
          </table:table-cell>
          <table:table-cell office:value-type="float" office:value="77.4941" calcext:value-type="float">
            <text:p>77.4941</text:p>
          </table:table-cell>
          <table:table-cell office:value-type="float" office:value="560073" calcext:value-type="float">
            <text:p>5600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89" calcext:value-type="float">
            <text:p>12.9889</text:p>
          </table:table-cell>
          <table:table-cell office:value-type="float" office:value="77.5741" calcext:value-type="float">
            <text:p>77.5741</text:p>
          </table:table-cell>
          <table:table-cell office:value-type="float" office:value="560020" calcext:value-type="float">
            <text:p>560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79" calcext:value-type="float">
            <text:p>12.9579</text:p>
          </table:table-cell>
          <table:table-cell office:value-type="float" office:value="77.6309" calcext:value-type="float">
            <text:p>77.6309</text:p>
          </table:table-cell>
          <table:table-cell office:value-type="float" office:value="560007" calcext:value-type="float">
            <text:p>560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79" calcext:value-type="float">
            <text:p>12.9579</text:p>
          </table:table-cell>
          <table:table-cell office:value-type="float" office:value="77.6309" calcext:value-type="float">
            <text:p>77.6309</text:p>
          </table:table-cell>
          <table:table-cell office:value-type="float" office:value="560007" calcext:value-type="float">
            <text:p>560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579" calcext:value-type="float">
            <text:p>12.9579</text:p>
          </table:table-cell>
          <table:table-cell office:value-type="float" office:value="77.6309" calcext:value-type="float">
            <text:p>77.6309</text:p>
          </table:table-cell>
          <table:table-cell office:value-type="float" office:value="560007" calcext:value-type="float">
            <text:p>560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166" calcext:value-type="float">
            <text:p>13.0166</text:p>
          </table:table-cell>
          <table:table-cell office:value-type="float" office:value="77.6804" calcext:value-type="float">
            <text:p>77.6804</text:p>
          </table:table-cell>
          <table:table-cell office:value-type="float" office:value="560016" calcext:value-type="float">
            <text:p>5600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4" calcext:value-type="float">
            <text:p>13.014</text:p>
          </table:table-cell>
          <table:table-cell office:value-type="float" office:value="77.5658" calcext:value-type="float">
            <text:p>77.5658</text:p>
          </table:table-cell>
          <table:table-cell office:value-type="float" office:value="560012" calcext:value-type="float">
            <text:p>560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4" calcext:value-type="float">
            <text:p>13.014</text:p>
          </table:table-cell>
          <table:table-cell office:value-type="float" office:value="77.5658" calcext:value-type="float">
            <text:p>77.5658</text:p>
          </table:table-cell>
          <table:table-cell office:value-type="float" office:value="560012" calcext:value-type="float">
            <text:p>560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4" calcext:value-type="float">
            <text:p>4</text:p>
          </table:table-cell>
          <table:table-cell office:value-type="float" office:value="13.0503" calcext:value-type="float">
            <text:p>13.0503</text:p>
          </table:table-cell>
          <table:table-cell office:value-type="float" office:value="77.5529" calcext:value-type="float">
            <text:p>77.5529</text:p>
          </table:table-cell>
          <table:table-cell office:value-type="float" office:value="560013" calcext:value-type="float">
            <text:p>560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3.0503" calcext:value-type="float">
            <text:p>13.0503</text:p>
          </table:table-cell>
          <table:table-cell office:value-type="float" office:value="77.5529" calcext:value-type="float">
            <text:p>77.5529</text:p>
          </table:table-cell>
          <table:table-cell office:value-type="float" office:value="560013" calcext:value-type="float">
            <text:p>560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83" calcext:value-type="float">
            <text:p>12.9883</text:p>
          </table:table-cell>
          <table:table-cell office:value-type="float" office:value="77.5987" calcext:value-type="float">
            <text:p>77.5987</text:p>
          </table:table-cell>
          <table:table-cell office:value-type="float" office:value="560051" calcext:value-type="float">
            <text:p>5600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School</text:p>
          </table:table-cell>
          <table:table-cell office:value-type="float" office:value="2" calcext:value-type="float">
            <text:p>2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3.0166" calcext:value-type="float">
            <text:p>13.0166</text:p>
          </table:table-cell>
          <table:table-cell office:value-type="float" office:value="77.6804" calcext:value-type="float">
            <text:p>77.6804</text:p>
          </table:table-cell>
          <table:table-cell office:value-type="float" office:value="560016" calcext:value-type="float">
            <text:p>5600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166" calcext:value-type="float">
            <text:p>13.0166</text:p>
          </table:table-cell>
          <table:table-cell office:value-type="float" office:value="77.6804" calcext:value-type="float">
            <text:p>77.6804</text:p>
          </table:table-cell>
          <table:table-cell office:value-type="float" office:value="560016" calcext:value-type="float">
            <text:p>5600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51" calcext:value-type="float">
            <text:p>12.9551</text:p>
          </table:table-cell>
          <table:table-cell office:value-type="float" office:value="77.6593" calcext:value-type="float">
            <text:p>77.6593</text:p>
          </table:table-cell>
          <table:table-cell office:value-type="float" office:value="560017" calcext:value-type="float">
            <text:p>5600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51" calcext:value-type="float">
            <text:p>12.9551</text:p>
          </table:table-cell>
          <table:table-cell office:value-type="float" office:value="77.6593" calcext:value-type="float">
            <text:p>77.6593</text:p>
          </table:table-cell>
          <table:table-cell office:value-type="float" office:value="560017" calcext:value-type="float">
            <text:p>5600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551" calcext:value-type="float">
            <text:p>12.9551</text:p>
          </table:table-cell>
          <table:table-cell office:value-type="float" office:value="77.6593" calcext:value-type="float">
            <text:p>77.6593</text:p>
          </table:table-cell>
          <table:table-cell office:value-type="float" office:value="560017" calcext:value-type="float">
            <text:p>5600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8652" calcext:value-type="float">
            <text:p>12.8652</text:p>
          </table:table-cell>
          <table:table-cell office:value-type="float" office:value="77.524" calcext:value-type="float">
            <text:p>77.524</text:p>
          </table:table-cell>
          <table:table-cell office:value-type="float" office:value="560109" calcext:value-type="float">
            <text:p>560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698" calcext:value-type="float">
            <text:p>12.9698</text:p>
          </table:table-cell>
          <table:table-cell office:value-type="float" office:value="77.75" calcext:value-type="float">
            <text:p>77.75</text:p>
          </table:table-cell>
          <table:table-cell office:value-type="float" office:value="560066" calcext:value-type="float">
            <text:p>5600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889" calcext:value-type="float">
            <text:p>12.9889</text:p>
          </table:table-cell>
          <table:table-cell office:value-type="float" office:value="77.5741" calcext:value-type="float">
            <text:p>77.5741</text:p>
          </table:table-cell>
          <table:table-cell office:value-type="float" office:value="560020" calcext:value-type="float">
            <text:p>560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School</text:p>
          </table:table-cell>
          <table:table-cell office:value-type="float" office:value="5" calcext:value-type="float">
            <text:p>5</text:p>
          </table:table-cell>
          <table:table-cell office:value-type="float" office:value="12.9889" calcext:value-type="float">
            <text:p>12.9889</text:p>
          </table:table-cell>
          <table:table-cell office:value-type="float" office:value="77.5741" calcext:value-type="float">
            <text:p>77.5741</text:p>
          </table:table-cell>
          <table:table-cell office:value-type="float" office:value="560020" calcext:value-type="float">
            <text:p>560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925" calcext:value-type="float">
            <text:p>12.9925</text:p>
          </table:table-cell>
          <table:table-cell office:value-type="float" office:value="77.5633" calcext:value-type="float">
            <text:p>77.5633</text:p>
          </table:table-cell>
          <table:table-cell office:value-type="float" office:value="560021" calcext:value-type="float">
            <text:p>56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57" calcext:value-type="float">
            <text:p>12.9757</text:p>
          </table:table-cell>
          <table:table-cell office:value-type="float" office:value="77.5586" calcext:value-type="float">
            <text:p>77.5586</text:p>
          </table:table-cell>
          <table:table-cell office:value-type="float" office:value="560023" calcext:value-type="float">
            <text:p>5600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57" calcext:value-type="float">
            <text:p>12.9757</text:p>
          </table:table-cell>
          <table:table-cell office:value-type="float" office:value="77.5586" calcext:value-type="float">
            <text:p>77.5586</text:p>
          </table:table-cell>
          <table:table-cell office:value-type="float" office:value="560023" calcext:value-type="float">
            <text:p>560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School</text:p>
          </table:table-cell>
          <table:table-cell office:value-type="float" office:value="6" calcext:value-type="float">
            <text:p>6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77.6068" calcext:value-type="float">
            <text:p>77.6068</text:p>
          </table:table-cell>
          <table:table-cell office:value-type="float" office:value="560025" calcext:value-type="float">
            <text:p>560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77.6068" calcext:value-type="float">
            <text:p>77.6068</text:p>
          </table:table-cell>
          <table:table-cell office:value-type="float" office:value="560025" calcext:value-type="float">
            <text:p>560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43" calcext:value-type="float">
            <text:p>12.9343</text:p>
          </table:table-cell>
          <table:table-cell office:value-type="float" office:value="77.6044" calcext:value-type="float">
            <text:p>77.6044</text:p>
          </table:table-cell>
          <table:table-cell office:value-type="float" office:value="560029" calcext:value-type="float">
            <text:p>560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77.6076" calcext:value-type="float">
            <text:p>77.6076</text:p>
          </table:table-cell>
          <table:table-cell office:value-type="float" office:value="560030" calcext:value-type="float">
            <text:p>560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77.6076" calcext:value-type="float">
            <text:p>77.6076</text:p>
          </table:table-cell>
          <table:table-cell office:value-type="float" office:value="560030" calcext:value-type="float">
            <text:p>560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School</text:p>
          </table:table-cell>
          <table:table-cell office:value-type="float" office:value="6" calcext:value-type="float">
            <text:p>6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77.6076" calcext:value-type="float">
            <text:p>77.6076</text:p>
          </table:table-cell>
          <table:table-cell office:value-type="float" office:value="560030" calcext:value-type="float">
            <text:p>560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298" calcext:value-type="float">
            <text:p>13.0298</text:p>
          </table:table-cell>
          <table:table-cell office:value-type="float" office:value="77.6047" calcext:value-type="float">
            <text:p>77.6047</text:p>
          </table:table-cell>
          <table:table-cell office:value-type="float" office:value="560032" calcext:value-type="float">
            <text:p>5600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621" calcext:value-type="float">
            <text:p>12.9621</text:p>
          </table:table-cell>
          <table:table-cell office:value-type="float" office:value="77.5376" calcext:value-type="float">
            <text:p>77.5376</text:p>
          </table:table-cell>
          <table:table-cell office:value-type="float" office:value="560104" calcext:value-type="float">
            <text:p>5601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217" calcext:value-type="float">
            <text:p>12.9217</text:p>
          </table:table-cell>
          <table:table-cell office:value-type="float" office:value="77.5936" calcext:value-type="float">
            <text:p>77.5936</text:p>
          </table:table-cell>
          <table:table-cell office:value-type="float" office:value="560041" calcext:value-type="float">
            <text:p>5600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12" calcext:value-type="float">
            <text:p>13.0012</text:p>
          </table:table-cell>
          <table:table-cell office:value-type="float" office:value="77.5995" calcext:value-type="float">
            <text:p>77.5995</text:p>
          </table:table-cell>
          <table:table-cell office:value-type="float" office:value="560046" calcext:value-type="float">
            <text:p>560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223" calcext:value-type="float">
            <text:p>13.0223</text:p>
          </table:table-cell>
          <table:table-cell office:value-type="float" office:value="77.7132" calcext:value-type="float">
            <text:p>77.7132</text:p>
          </table:table-cell>
          <table:table-cell office:value-type="float" office:value="560049" calcext:value-type="float">
            <text:p>5600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School</text:p>
          </table:table-cell>
          <table:table-cell office:value-type="float" office:value="3" calcext:value-type="float">
            <text:p>3</text:p>
          </table:table-cell>
          <table:table-cell office:value-type="float" office:value="12.982" calcext:value-type="float">
            <text:p>12.982</text:p>
          </table:table-cell>
          <table:table-cell office:value-type="float" office:value="77.6256" calcext:value-type="float">
            <text:p>77.6256</text:p>
          </table:table-cell>
          <table:table-cell office:value-type="float" office:value="560008" calcext:value-type="float">
            <text:p>560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62" calcext:value-type="float">
            <text:p>13.0262</text:p>
          </table:table-cell>
          <table:table-cell office:value-type="float" office:value="77.62" calcext:value-type="float">
            <text:p>77.62</text:p>
          </table:table-cell>
          <table:table-cell office:value-type="float" office:value="560045" calcext:value-type="float">
            <text:p>5600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17" calcext:value-type="float">
            <text:p>12.9217</text:p>
          </table:table-cell>
          <table:table-cell office:value-type="float" office:value="77.5936" calcext:value-type="float">
            <text:p>77.5936</text:p>
          </table:table-cell>
          <table:table-cell office:value-type="float" office:value="560041" calcext:value-type="float">
            <text:p>5600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078" calcext:value-type="float">
            <text:p>13.0078</text:p>
          </table:table-cell>
          <table:table-cell office:value-type="float" office:value="77.5577" calcext:value-type="float">
            <text:p>77.5577</text:p>
          </table:table-cell>
          <table:table-cell office:value-type="float" office:value="560055" calcext:value-type="float">
            <text:p>5600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078" calcext:value-type="float">
            <text:p>13.0078</text:p>
          </table:table-cell>
          <table:table-cell office:value-type="float" office:value="77.5577" calcext:value-type="float">
            <text:p>77.5577</text:p>
          </table:table-cell>
          <table:table-cell office:value-type="float" office:value="560055" calcext:value-type="float">
            <text:p>5600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217" calcext:value-type="float">
            <text:p>12.9217</text:p>
          </table:table-cell>
          <table:table-cell office:value-type="float" office:value="77.5936" calcext:value-type="float">
            <text:p>77.5936</text:p>
          </table:table-cell>
          <table:table-cell office:value-type="float" office:value="560041" calcext:value-type="float">
            <text:p>5600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105" calcext:value-type="float">
            <text:p>12.9105</text:p>
          </table:table-cell>
          <table:table-cell office:value-type="float" office:value="77.4842" calcext:value-type="float">
            <text:p>77.4842</text:p>
          </table:table-cell>
          <table:table-cell office:value-type="float" office:value="560060" calcext:value-type="float">
            <text:p>5600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105" calcext:value-type="float">
            <text:p>12.9105</text:p>
          </table:table-cell>
          <table:table-cell office:value-type="float" office:value="77.4842" calcext:value-type="float">
            <text:p>77.4842</text:p>
          </table:table-cell>
          <table:table-cell office:value-type="float" office:value="560060" calcext:value-type="float">
            <text:p>5600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037" calcext:value-type="float">
            <text:p>12.9037</text:p>
          </table:table-cell>
          <table:table-cell office:value-type="float" office:value="77.5376" calcext:value-type="float">
            <text:p>77.5376</text:p>
          </table:table-cell>
          <table:table-cell office:value-type="float" office:value="560061" calcext:value-type="float">
            <text:p>5600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34" calcext:value-type="float">
            <text:p>12.8834</text:p>
          </table:table-cell>
          <table:table-cell office:value-type="float" office:value="77.5486" calcext:value-type="float">
            <text:p>77.5486</text:p>
          </table:table-cell>
          <table:table-cell office:value-type="float" office:value="560062" calcext:value-type="float">
            <text:p>5600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149" calcext:value-type="float">
            <text:p>12.9149</text:p>
          </table:table-cell>
          <table:table-cell office:value-type="float" office:value="77.5635" calcext:value-type="float">
            <text:p>77.5635</text:p>
          </table:table-cell>
          <table:table-cell office:value-type="float" office:value="560070" calcext:value-type="float">
            <text:p>5600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149" calcext:value-type="float">
            <text:p>12.9149</text:p>
          </table:table-cell>
          <table:table-cell office:value-type="float" office:value="77.5635" calcext:value-type="float">
            <text:p>77.5635</text:p>
          </table:table-cell>
          <table:table-cell office:value-type="float" office:value="560070" calcext:value-type="float">
            <text:p>5600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306" calcext:value-type="float">
            <text:p>12.9306</text:p>
          </table:table-cell>
          <table:table-cell office:value-type="float" office:value="77.5434" calcext:value-type="float">
            <text:p>77.5434</text:p>
          </table:table-cell>
          <table:table-cell office:value-type="float" office:value="560085" calcext:value-type="float">
            <text:p>5600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41" calcext:value-type="float">
            <text:p>13.0641</text:p>
          </table:table-cell>
          <table:table-cell office:value-type="float" office:value="77.5931" calcext:value-type="float">
            <text:p>77.5931</text:p>
          </table:table-cell>
          <table:table-cell office:value-type="float" office:value="560092" calcext:value-type="float">
            <text:p>5600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77.5921" calcext:value-type="float">
            <text:p>77.5921</text:p>
          </table:table-cell>
          <table:table-cell office:value-type="float" office:value="560027" calcext:value-type="float">
            <text:p>5600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809" calcext:value-type="float">
            <text:p>13.0809</text:p>
          </table:table-cell>
          <table:table-cell office:value-type="float" office:value="77.5565" calcext:value-type="float">
            <text:p>77.5565</text:p>
          </table:table-cell>
          <table:table-cell office:value-type="float" office:value="560097" calcext:value-type="float">
            <text:p>560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41" calcext:value-type="float">
            <text:p>13.0641</text:p>
          </table:table-cell>
          <table:table-cell office:value-type="float" office:value="77.5931" calcext:value-type="float">
            <text:p>77.5931</text:p>
          </table:table-cell>
          <table:table-cell office:value-type="float" office:value="560092" calcext:value-type="float">
            <text:p>5600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77.6713" calcext:value-type="float">
            <text:p>77.6713</text:p>
          </table:table-cell>
          <table:table-cell office:value-type="float" office:value="560093" calcext:value-type="float">
            <text:p>5600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School</text:p>
          </table:table-cell>
          <table:table-cell office:value-type="float" office:value="3" calcext:value-type="float">
            <text:p>3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77.6713" calcext:value-type="float">
            <text:p>77.6713</text:p>
          </table:table-cell>
          <table:table-cell office:value-type="float" office:value="560093" calcext:value-type="float">
            <text:p>5600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866" calcext:value-type="float">
            <text:p>12.9866</text:p>
          </table:table-cell>
          <table:table-cell office:value-type="float" office:value="77.4904" calcext:value-type="float">
            <text:p>77.4904</text:p>
          </table:table-cell>
          <table:table-cell office:value-type="float" office:value="560091" calcext:value-type="float">
            <text:p>5600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847" calcext:value-type="float">
            <text:p>12.9847</text:p>
          </table:table-cell>
          <table:table-cell office:value-type="float" office:value="77.5491" calcext:value-type="float">
            <text:p>77.5491</text:p>
          </table:table-cell>
          <table:table-cell office:value-type="float" office:value="560100" calcext:value-type="float">
            <text:p>560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847" calcext:value-type="float">
            <text:p>12.9847</text:p>
          </table:table-cell>
          <table:table-cell office:value-type="float" office:value="77.5491" calcext:value-type="float">
            <text:p>77.5491</text:p>
          </table:table-cell>
          <table:table-cell office:value-type="float" office:value="560100" calcext:value-type="float">
            <text:p>560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847" calcext:value-type="float">
            <text:p>12.9847</text:p>
          </table:table-cell>
          <table:table-cell office:value-type="float" office:value="77.5491" calcext:value-type="float">
            <text:p>77.5491</text:p>
          </table:table-cell>
          <table:table-cell office:value-type="float" office:value="560100" calcext:value-type="float">
            <text:p>560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299" calcext:value-type="float">
            <text:p>12.9299</text:p>
          </table:table-cell>
          <table:table-cell office:value-type="float" office:value="77.6848" calcext:value-type="float">
            <text:p>77.6848</text:p>
          </table:table-cell>
          <table:table-cell office:value-type="float" office:value="560103" calcext:value-type="float">
            <text:p>560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99" calcext:value-type="float">
            <text:p>12.9299</text:p>
          </table:table-cell>
          <table:table-cell office:value-type="float" office:value="77.6848" calcext:value-type="float">
            <text:p>77.6848</text:p>
          </table:table-cell>
          <table:table-cell office:value-type="float" office:value="560103" calcext:value-type="float">
            <text:p>560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House wife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School</text:p>
          </table:table-cell>
          <table:table-cell office:value-type="float" office:value="6" calcext:value-type="float">
            <text:p>6</text:p>
          </table:table-cell>
          <table:table-cell office:value-type="float" office:value="12.9828" calcext:value-type="float">
            <text:p>12.9828</text:p>
          </table:table-cell>
          <table:table-cell office:value-type="float" office:value="77.6131" calcext:value-type="float">
            <text:p>77.6131</text:p>
          </table:table-cell>
          <table:table-cell office:value-type="float" office:value="560042" calcext:value-type="float">
            <text:p>5600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9" calcext:value-type="float">
            <text:p>12.989</text:p>
          </table:table-cell>
          <table:table-cell office:value-type="float" office:value="77.5332" calcext:value-type="float">
            <text:p>77.5332</text:p>
          </table:table-cell>
          <table:table-cell office:value-type="float" office:value="560079" calcext:value-type="float">
            <text:p>5600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School</text:p>
          </table:table-cell>
          <table:table-cell office:value-type="float" office:value="6" calcext:value-type="float">
            <text:p>6</text:p>
          </table:table-cell>
          <table:table-cell office:value-type="float" office:value="12.9251" calcext:value-type="float">
            <text:p>12.9251</text:p>
          </table:table-cell>
          <table:table-cell office:value-type="float" office:value="77.4992" calcext:value-type="float">
            <text:p>77.4992</text:p>
          </table:table-cell>
          <table:table-cell office:value-type="float" office:value="560059" calcext:value-type="float">
            <text:p>5600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967" calcext:value-type="float">
            <text:p>12.9967</text:p>
          </table:table-cell>
          <table:table-cell office:value-type="float" office:value="77.7582" calcext:value-type="float">
            <text:p>77.7582</text:p>
          </table:table-cell>
          <table:table-cell office:value-type="float" office:value="560067" calcext:value-type="float">
            <text:p>5600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967" calcext:value-type="float">
            <text:p>12.9967</text:p>
          </table:table-cell>
          <table:table-cell office:value-type="float" office:value="77.7582" calcext:value-type="float">
            <text:p>77.7582</text:p>
          </table:table-cell>
          <table:table-cell office:value-type="float" office:value="560067" calcext:value-type="float">
            <text:p>5600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967" calcext:value-type="float">
            <text:p>12.9967</text:p>
          </table:table-cell>
          <table:table-cell office:value-type="float" office:value="77.7582" calcext:value-type="float">
            <text:p>77.7582</text:p>
          </table:table-cell>
          <table:table-cell office:value-type="float" office:value="560067" calcext:value-type="float">
            <text:p>5600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7" calcext:value-type="float">
            <text:p>12.957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560018" calcext:value-type="float">
            <text:p>5600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89" calcext:value-type="float">
            <text:p>12.9889</text:p>
          </table:table-cell>
          <table:table-cell office:value-type="float" office:value="77.5741" calcext:value-type="float">
            <text:p>77.5741</text:p>
          </table:table-cell>
          <table:table-cell office:value-type="float" office:value="560020" calcext:value-type="float">
            <text:p>560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77.6399" calcext:value-type="float">
            <text:p>77.6399</text:p>
          </table:table-cell>
          <table:table-cell office:value-type="float" office:value="560068" calcext:value-type="float">
            <text:p>5600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77.6399" calcext:value-type="float">
            <text:p>77.6399</text:p>
          </table:table-cell>
          <table:table-cell office:value-type="float" office:value="560068" calcext:value-type="float">
            <text:p>5600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967" calcext:value-type="float">
            <text:p>12.9967</text:p>
          </table:table-cell>
          <table:table-cell office:value-type="float" office:value="77.7582" calcext:value-type="float">
            <text:p>77.7582</text:p>
          </table:table-cell>
          <table:table-cell office:value-type="float" office:value="560067" calcext:value-type="float">
            <text:p>5600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925" calcext:value-type="float">
            <text:p>12.9925</text:p>
          </table:table-cell>
          <table:table-cell office:value-type="float" office:value="77.5633" calcext:value-type="float">
            <text:p>77.5633</text:p>
          </table:table-cell>
          <table:table-cell office:value-type="float" office:value="560021" calcext:value-type="float">
            <text:p>56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925" calcext:value-type="float">
            <text:p>12.9925</text:p>
          </table:table-cell>
          <table:table-cell office:value-type="float" office:value="77.5633" calcext:value-type="float">
            <text:p>77.5633</text:p>
          </table:table-cell>
          <table:table-cell office:value-type="float" office:value="560021" calcext:value-type="float">
            <text:p>560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77.5921" calcext:value-type="float">
            <text:p>77.5921</text:p>
          </table:table-cell>
          <table:table-cell office:value-type="float" office:value="560027" calcext:value-type="float">
            <text:p>5600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77.5921" calcext:value-type="float">
            <text:p>77.5921</text:p>
          </table:table-cell>
          <table:table-cell office:value-type="float" office:value="560027" calcext:value-type="float">
            <text:p>5600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734" calcext:value-type="float">
            <text:p>13.0734</text:p>
          </table:table-cell>
          <table:table-cell office:value-type="float" office:value="77.5464" calcext:value-type="float">
            <text:p>77.5464</text:p>
          </table:table-cell>
          <table:table-cell office:value-type="float" office:value="560014" calcext:value-type="float">
            <text:p>5600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77.5923" calcext:value-type="float">
            <text:p>77.5923</text:p>
          </table:table-cell>
          <table:table-cell office:value-type="float" office:value="560024" calcext:value-type="float">
            <text:p>560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15" calcext:value-type="float">
            <text:p>12.9515</text:p>
          </table:table-cell>
          <table:table-cell office:value-type="float" office:value="77.4921" calcext:value-type="float">
            <text:p>77.4921</text:p>
          </table:table-cell>
          <table:table-cell office:value-type="float" office:value="560056" calcext:value-type="float">
            <text:p>5600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15" calcext:value-type="float">
            <text:p>12.9515</text:p>
          </table:table-cell>
          <table:table-cell office:value-type="float" office:value="77.4921" calcext:value-type="float">
            <text:p>77.4921</text:p>
          </table:table-cell>
          <table:table-cell office:value-type="float" office:value="560056" calcext:value-type="float">
            <text:p>5600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19" calcext:value-type="float">
            <text:p>12.9719</text:p>
          </table:table-cell>
          <table:table-cell office:value-type="float" office:value="77.5128" calcext:value-type="float">
            <text:p>77.5128</text:p>
          </table:table-cell>
          <table:table-cell office:value-type="float" office:value="560072" calcext:value-type="float">
            <text:p>5600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77.6399" calcext:value-type="float">
            <text:p>77.6399</text:p>
          </table:table-cell>
          <table:table-cell office:value-type="float" office:value="560068" calcext:value-type="float">
            <text:p>5600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828" calcext:value-type="float">
            <text:p>12.9828</text:p>
          </table:table-cell>
          <table:table-cell office:value-type="float" office:value="77.6131" calcext:value-type="float">
            <text:p>77.6131</text:p>
          </table:table-cell>
          <table:table-cell office:value-type="float" office:value="560042" calcext:value-type="float">
            <text:p>5600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h.D</text:p>
          </table:table-cell>
          <table:table-cell office:value-type="float" office:value="2" calcext:value-type="float">
            <text:p>2</text:p>
          </table:table-cell>
          <table:table-cell office:value-type="float" office:value="12.9757" calcext:value-type="float">
            <text:p>12.9757</text:p>
          </table:table-cell>
          <table:table-cell office:value-type="float" office:value="77.5586" calcext:value-type="float">
            <text:p>77.5586</text:p>
          </table:table-cell>
          <table:table-cell office:value-type="float" office:value="560023" calcext:value-type="float">
            <text:p>5600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57" calcext:value-type="float">
            <text:p>12.9757</text:p>
          </table:table-cell>
          <table:table-cell office:value-type="float" office:value="77.5586" calcext:value-type="float">
            <text:p>77.5586</text:p>
          </table:table-cell>
          <table:table-cell office:value-type="float" office:value="560023" calcext:value-type="float">
            <text:p>5600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57" calcext:value-type="float">
            <text:p>12.9757</text:p>
          </table:table-cell>
          <table:table-cell office:value-type="float" office:value="77.5586" calcext:value-type="float">
            <text:p>77.5586</text:p>
          </table:table-cell>
          <table:table-cell office:value-type="float" office:value="560023" calcext:value-type="float">
            <text:p>560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734" calcext:value-type="float">
            <text:p>13.0734</text:p>
          </table:table-cell>
          <table:table-cell office:value-type="float" office:value="77.5464" calcext:value-type="float">
            <text:p>77.5464</text:p>
          </table:table-cell>
          <table:table-cell office:value-type="float" office:value="560014" calcext:value-type="float">
            <text:p>5600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734" calcext:value-type="float">
            <text:p>13.0734</text:p>
          </table:table-cell>
          <table:table-cell office:value-type="float" office:value="77.5464" calcext:value-type="float">
            <text:p>77.5464</text:p>
          </table:table-cell>
          <table:table-cell office:value-type="float" office:value="560014" calcext:value-type="float">
            <text:p>5600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3.0734" calcext:value-type="float">
            <text:p>13.0734</text:p>
          </table:table-cell>
          <table:table-cell office:value-type="float" office:value="77.5464" calcext:value-type="float">
            <text:p>77.5464</text:p>
          </table:table-cell>
          <table:table-cell office:value-type="float" office:value="560014" calcext:value-type="float">
            <text:p>560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98" calcext:value-type="float">
            <text:p>12.998</text:p>
          </table:table-cell>
          <table:table-cell office:value-type="float" office:value="77.6227" calcext:value-type="float">
            <text:p>77.6227</text:p>
          </table:table-cell>
          <table:table-cell office:value-type="float" office:value="560005" calcext:value-type="float">
            <text:p>560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h.D</text:p>
          </table:table-cell>
          <table:table-cell office:value-type="float" office:value="5" calcext:value-type="float">
            <text:p>5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26" calcext:value-type="float">
            <text:p>13.0626</text:p>
          </table:table-cell>
          <table:table-cell office:value-type="float" office:value="77.5284" calcext:value-type="float">
            <text:p>77.5284</text:p>
          </table:table-cell>
          <table:table-cell office:value-type="float" office:value="560015" calcext:value-type="float">
            <text:p>560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77.5877" calcext:value-type="float">
            <text:p>77.5877</text:p>
          </table:table-cell>
          <table:table-cell office:value-type="float" office:value="560006" calcext:value-type="float">
            <text:p>5600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77.5877" calcext:value-type="float">
            <text:p>77.5877</text:p>
          </table:table-cell>
          <table:table-cell office:value-type="float" office:value="560006" calcext:value-type="float">
            <text:p>560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3.014" calcext:value-type="float">
            <text:p>13.014</text:p>
          </table:table-cell>
          <table:table-cell office:value-type="float" office:value="77.5658" calcext:value-type="float">
            <text:p>77.5658</text:p>
          </table:table-cell>
          <table:table-cell office:value-type="float" office:value="560012" calcext:value-type="float">
            <text:p>560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551" calcext:value-type="float">
            <text:p>12.9551</text:p>
          </table:table-cell>
          <table:table-cell office:value-type="float" office:value="77.6593" calcext:value-type="float">
            <text:p>77.6593</text:p>
          </table:table-cell>
          <table:table-cell office:value-type="float" office:value="560017" calcext:value-type="float">
            <text:p>5600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473" calcext:value-type="float">
            <text:p>12.9473</text:p>
          </table:table-cell>
          <table:table-cell office:value-type="float" office:value="77.5616" calcext:value-type="float">
            <text:p>77.5616</text:p>
          </table:table-cell>
          <table:table-cell office:value-type="float" office:value="560019" calcext:value-type="float">
            <text:p>560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99" calcext:value-type="float">
            <text:p>12.9299</text:p>
          </table:table-cell>
          <table:table-cell office:value-type="float" office:value="77.6848" calcext:value-type="float">
            <text:p>77.6848</text:p>
          </table:table-cell>
          <table:table-cell office:value-type="float" office:value="560103" calcext:value-type="float">
            <text:p>560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28" calcext:value-type="float">
            <text:p>12.9828</text:p>
          </table:table-cell>
          <table:table-cell office:value-type="float" office:value="77.6131" calcext:value-type="float">
            <text:p>77.6131</text:p>
          </table:table-cell>
          <table:table-cell office:value-type="float" office:value="560042" calcext:value-type="float">
            <text:p>5600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54" calcext:value-type="float">
            <text:p>12.9854</text:p>
          </table:table-cell>
          <table:table-cell office:value-type="float" office:value="77.7081" calcext:value-type="float">
            <text:p>77.7081</text:p>
          </table:table-cell>
          <table:table-cell office:value-type="float" office:value="560048" calcext:value-type="float">
            <text:p>560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037" calcext:value-type="float">
            <text:p>12.9037</text:p>
          </table:table-cell>
          <table:table-cell office:value-type="float" office:value="77.5376" calcext:value-type="float">
            <text:p>77.5376</text:p>
          </table:table-cell>
          <table:table-cell office:value-type="float" office:value="560061" calcext:value-type="float">
            <text:p>5600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34" calcext:value-type="float">
            <text:p>12.8834</text:p>
          </table:table-cell>
          <table:table-cell office:value-type="float" office:value="77.5486" calcext:value-type="float">
            <text:p>77.5486</text:p>
          </table:table-cell>
          <table:table-cell office:value-type="float" office:value="560062" calcext:value-type="float">
            <text:p>5600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149" calcext:value-type="float">
            <text:p>12.9149</text:p>
          </table:table-cell>
          <table:table-cell office:value-type="float" office:value="77.5635" calcext:value-type="float">
            <text:p>77.5635</text:p>
          </table:table-cell>
          <table:table-cell office:value-type="float" office:value="560070" calcext:value-type="float">
            <text:p>5600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149" calcext:value-type="float">
            <text:p>12.9149</text:p>
          </table:table-cell>
          <table:table-cell office:value-type="float" office:value="77.5635" calcext:value-type="float">
            <text:p>77.5635</text:p>
          </table:table-cell>
          <table:table-cell office:value-type="float" office:value="560070" calcext:value-type="float">
            <text:p>5600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306" calcext:value-type="float">
            <text:p>12.9306</text:p>
          </table:table-cell>
          <table:table-cell office:value-type="float" office:value="77.5434" calcext:value-type="float">
            <text:p>77.5434</text:p>
          </table:table-cell>
          <table:table-cell office:value-type="float" office:value="560085" calcext:value-type="float">
            <text:p>5600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41" calcext:value-type="float">
            <text:p>13.0641</text:p>
          </table:table-cell>
          <table:table-cell office:value-type="float" office:value="77.5931" calcext:value-type="float">
            <text:p>77.5931</text:p>
          </table:table-cell>
          <table:table-cell office:value-type="float" office:value="560092" calcext:value-type="float">
            <text:p>5600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77.5921" calcext:value-type="float">
            <text:p>77.5921</text:p>
          </table:table-cell>
          <table:table-cell office:value-type="float" office:value="560027" calcext:value-type="float">
            <text:p>5600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217" calcext:value-type="float">
            <text:p>12.9217</text:p>
          </table:table-cell>
          <table:table-cell office:value-type="float" office:value="77.5936" calcext:value-type="float">
            <text:p>77.5936</text:p>
          </table:table-cell>
          <table:table-cell office:value-type="float" office:value="560041" calcext:value-type="float">
            <text:p>5600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12" calcext:value-type="float">
            <text:p>13.0012</text:p>
          </table:table-cell>
          <table:table-cell office:value-type="float" office:value="77.5995" calcext:value-type="float">
            <text:p>77.5995</text:p>
          </table:table-cell>
          <table:table-cell office:value-type="float" office:value="560046" calcext:value-type="float">
            <text:p>560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223" calcext:value-type="float">
            <text:p>13.0223</text:p>
          </table:table-cell>
          <table:table-cell office:value-type="float" office:value="77.7132" calcext:value-type="float">
            <text:p>77.7132</text:p>
          </table:table-cell>
          <table:table-cell office:value-type="float" office:value="560049" calcext:value-type="float">
            <text:p>5600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337" calcext:value-type="float">
            <text:p>12.9337</text:p>
          </table:table-cell>
          <table:table-cell office:value-type="float" office:value="77.59" calcext:value-type="float">
            <text:p>77.59</text:p>
          </table:table-cell>
          <table:table-cell office:value-type="float" office:value="560011" calcext:value-type="float">
            <text:p>560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School</text:p>
          </table:table-cell>
          <table:table-cell office:value-type="float" office:value="3" calcext:value-type="float">
            <text:p>3</text:p>
          </table:table-cell>
          <table:table-cell office:value-type="float" office:value="12.982" calcext:value-type="float">
            <text:p>12.982</text:p>
          </table:table-cell>
          <table:table-cell office:value-type="float" office:value="77.6256" calcext:value-type="float">
            <text:p>77.6256</text:p>
          </table:table-cell>
          <table:table-cell office:value-type="float" office:value="560008" calcext:value-type="float">
            <text:p>560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3.0262" calcext:value-type="float">
            <text:p>13.0262</text:p>
          </table:table-cell>
          <table:table-cell office:value-type="float" office:value="77.62" calcext:value-type="float">
            <text:p>77.62</text:p>
          </table:table-cell>
          <table:table-cell office:value-type="float" office:value="560045" calcext:value-type="float">
            <text:p>5600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17" calcext:value-type="float">
            <text:p>12.9217</text:p>
          </table:table-cell>
          <table:table-cell office:value-type="float" office:value="77.5936" calcext:value-type="float">
            <text:p>77.5936</text:p>
          </table:table-cell>
          <table:table-cell office:value-type="float" office:value="560041" calcext:value-type="float">
            <text:p>5600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77.6821" calcext:value-type="float">
            <text:p>77.6821</text:p>
          </table:table-cell>
          <table:table-cell office:value-type="float" office:value="560036" calcext:value-type="float">
            <text:p>5600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77.6221" calcext:value-type="float">
            <text:p>77.6221</text:p>
          </table:table-cell>
          <table:table-cell office:value-type="float" office:value="560034" calcext:value-type="float">
            <text:p>560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217" calcext:value-type="float">
            <text:p>12.9217</text:p>
          </table:table-cell>
          <table:table-cell office:value-type="float" office:value="77.5936" calcext:value-type="float">
            <text:p>77.5936</text:p>
          </table:table-cell>
          <table:table-cell office:value-type="float" office:value="560041" calcext:value-type="float">
            <text:p>5600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77.6479" calcext:value-type="float">
            <text:p>77.6479</text:p>
          </table:table-cell>
          <table:table-cell office:value-type="float" office:value="560043" calcext:value-type="float">
            <text:p>5600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012" calcext:value-type="float">
            <text:p>13.0012</text:p>
          </table:table-cell>
          <table:table-cell office:value-type="float" office:value="77.5995" calcext:value-type="float">
            <text:p>77.5995</text:p>
          </table:table-cell>
          <table:table-cell office:value-type="float" office:value="560046" calcext:value-type="float">
            <text:p>560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10001 to 25000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77.6529" calcext:value-type="float">
            <text:p>77.6529</text:p>
          </table:table-cell>
          <table:table-cell office:value-type="float" office:value="560075" calcext:value-type="float">
            <text:p>56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77.6408" calcext:value-type="float">
            <text:p>77.6408</text:p>
          </table:table-cell>
          <table:table-cell office:value-type="float" office:value="560038" calcext:value-type="float">
            <text:p>560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77.5796" calcext:value-type="float">
            <text:p>77.5796</text:p>
          </table:table-cell>
          <table:table-cell office:value-type="float" office:value="560080" calcext:value-type="float">
            <text:p>5600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h.D</text:p>
          </table:table-cell>
          <table:table-cell office:value-type="float" office:value="3" calcext:value-type="float">
            <text:p>3</text:p>
          </table:table-cell>
          <table:table-cell office:value-type="float" office:value="12.9306" calcext:value-type="float">
            <text:p>12.9306</text:p>
          </table:table-cell>
          <table:table-cell office:value-type="float" office:value="77.5434" calcext:value-type="float">
            <text:p>77.5434</text:p>
          </table:table-cell>
          <table:table-cell office:value-type="float" office:value="560085" calcext:value-type="float">
            <text:p>5600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41" calcext:value-type="float">
            <text:p>13.0641</text:p>
          </table:table-cell>
          <table:table-cell office:value-type="float" office:value="77.5931" calcext:value-type="float">
            <text:p>77.5931</text:p>
          </table:table-cell>
          <table:table-cell office:value-type="float" office:value="560092" calcext:value-type="float">
            <text:p>5600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77.5921" calcext:value-type="float">
            <text:p>77.5921</text:p>
          </table:table-cell>
          <table:table-cell office:value-type="float" office:value="560027" calcext:value-type="float">
            <text:p>5600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560076" calcext:value-type="float">
            <text:p>5600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369" calcext:value-type="float">
            <text:p>12.9369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560095" calcext:value-type="float">
            <text:p>5600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3.0158" calcext:value-type="float">
            <text:p>13.0158</text:p>
          </table:table-cell>
          <table:table-cell office:value-type="float" office:value="77.539" calcext:value-type="float">
            <text:p>77.539</text:p>
          </table:table-cell>
          <table:table-cell office:value-type="float" office:value="560096" calcext:value-type="float">
            <text:p>5600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3.0809" calcext:value-type="float">
            <text:p>13.0809</text:p>
          </table:table-cell>
          <table:table-cell office:value-type="float" office:value="77.5565" calcext:value-type="float">
            <text:p>77.5565</text:p>
          </table:table-cell>
          <table:table-cell office:value-type="float" office:value="560097" calcext:value-type="float">
            <text:p>560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3.0641" calcext:value-type="float">
            <text:p>13.0641</text:p>
          </table:table-cell>
          <table:table-cell office:value-type="float" office:value="77.5931" calcext:value-type="float">
            <text:p>77.5931</text:p>
          </table:table-cell>
          <table:table-cell office:value-type="float" office:value="560092" calcext:value-type="float">
            <text:p>5600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6" calcext:value-type="float">
            <text:p>6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77.6713" calcext:value-type="float">
            <text:p>77.6713</text:p>
          </table:table-cell>
          <table:table-cell office:value-type="float" office:value="560093" calcext:value-type="float">
            <text:p>5600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lf Employeed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School</text:p>
          </table:table-cell>
          <table:table-cell office:value-type="float" office:value="3" calcext:value-type="float">
            <text:p>3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77.6713" calcext:value-type="float">
            <text:p>77.6713</text:p>
          </table:table-cell>
          <table:table-cell office:value-type="float" office:value="560093" calcext:value-type="float">
            <text:p>5600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Graduate</text:p>
          </table:table-cell>
          <table:table-cell office:value-type="float" office:value="1" calcext:value-type="float">
            <text:p>1</text:p>
          </table:table-cell>
          <table:table-cell office:value-type="float" office:value="12.9866" calcext:value-type="float">
            <text:p>12.9866</text:p>
          </table:table-cell>
          <table:table-cell office:value-type="float" office:value="77.4904" calcext:value-type="float">
            <text:p>77.4904</text:p>
          </table:table-cell>
          <table:table-cell office:value-type="float" office:value="560091" calcext:value-type="float">
            <text:p>5600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25001 to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847" calcext:value-type="float">
            <text:p>12.9847</text:p>
          </table:table-cell>
          <table:table-cell office:value-type="float" office:value="77.5491" calcext:value-type="float">
            <text:p>77.5491</text:p>
          </table:table-cell>
          <table:table-cell office:value-type="float" office:value="560100" calcext:value-type="float">
            <text:p>560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ore than 5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299" calcext:value-type="float">
            <text:p>12.9299</text:p>
          </table:table-cell>
          <table:table-cell office:value-type="float" office:value="77.6848" calcext:value-type="float">
            <text:p>77.6848</text:p>
          </table:table-cell>
          <table:table-cell office:value-type="float" office:value="560103" calcext:value-type="float">
            <text:p>560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3" calcext:value-type="float">
            <text:p>3</text:p>
          </table:table-cell>
          <table:table-cell office:value-type="float" office:value="12.9828" calcext:value-type="float">
            <text:p>12.9828</text:p>
          </table:table-cell>
          <table:table-cell office:value-type="float" office:value="77.6131" calcext:value-type="float">
            <text:p>77.6131</text:p>
          </table:table-cell>
          <table:table-cell office:value-type="float" office:value="560042" calcext:value-type="float">
            <text:p>5600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66" calcext:value-type="float">
            <text:p>12.9766</text:p>
          </table:table-cell>
          <table:table-cell office:value-type="float" office:value="77.5993" calcext:value-type="float">
            <text:p>77.5993</text:p>
          </table:table-cell>
          <table:table-cell office:value-type="float" office:value="560001" calcext:value-type="float">
            <text:p>56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4" calcext:value-type="float">
            <text:p>4</text:p>
          </table:table-cell>
          <table:table-cell office:value-type="float" office:value="12.9854" calcext:value-type="float">
            <text:p>12.9854</text:p>
          </table:table-cell>
          <table:table-cell office:value-type="float" office:value="77.7081" calcext:value-type="float">
            <text:p>77.7081</text:p>
          </table:table-cell>
          <table:table-cell office:value-type="float" office:value="560048" calcext:value-type="float">
            <text:p>560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985" calcext:value-type="float">
            <text:p>12.985</text:p>
          </table:table-cell>
          <table:table-cell office:value-type="float" office:value="77.5533" calcext:value-type="float">
            <text:p>77.5533</text:p>
          </table:table-cell>
          <table:table-cell office:value-type="float" office:value="560010" calcext:value-type="float">
            <text:p>560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elow Rs.10000</text:p>
          </table:table-cell>
          <table:table-cell office:value-type="string" calcext:value-type="string">
            <text:p>Post Graduate</text:p>
          </table:table-cell>
          <table:table-cell office:value-type="float" office:value="2" calcext:value-type="float">
            <text:p>2</text:p>
          </table:table-cell>
          <table:table-cell office:value-type="float" office:value="12.977" calcext:value-type="float">
            <text:p>12.977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560009" calcext:value-type="float">
            <text:p>56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Post Graduate</text:p>
          </table:table-cell>
          <table:table-cell office:value-type="float" office:value="5" calcext:value-type="float">
            <text:p>5</text:p>
          </table:table-cell>
          <table:table-cell office:value-type="float" office:value="12.8988" calcext:value-type="float">
            <text:p>12.8988</text:p>
          </table:table-cell>
          <table:table-cell office:value-type="float" office:value="77.5764" calcext:value-type="float">
            <text:p>77.5764</text:p>
          </table:table-cell>
          <table:table-cell office:value-type="float" office:value="560078" calcext:value-type="float">
            <text:p>5600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3:03:44.008043500</meta:creation-date>
    <dc:date>2026-04-08T13:04:52.719674700</dc:date>
    <meta:editing-duration>PT1M8S</meta:editing-duration>
    <meta:editing-cycles>1</meta:editing-cycles>
    <meta:document-statistic meta:table-count="1" meta:cell-count="5057" meta:object-count="0"/>
    <meta:generator>LibreOffice/25.8.5.2$Windows_X86_64 LibreOffice_project/9c8b85f387cc00a89945a79c9e6239f32e450ac2</meta:generator>
  </office:meta>
</office:document-meta>
</file>